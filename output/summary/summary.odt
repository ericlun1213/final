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text-properties style:font-name="Menlo" fo:font-size="20.0pt" fo:color="#000000"/>
    </style:style>
    <style:style style:name="P2" style:family="paragraph" style:parent-style-name="Standard">
      <style:text-properties style:font-name="Menlo" fo:font-size="16.0pt" fo:color="#000000"/>
    </style:style>
    <style:style style:name="P3" style:family="paragraph" style:parent-style-name="Standard">
      <style:text-properties style:font-name="Menlo" fo:font-size="12.0pt" fo:color="#000000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analysis_summary</text:span></text:p>
      <text:p text:style-name="P2"><text:span text:style-name="T1"/></text:p>
      <text:p text:style-name="P2"><text:span text:style-name="T1">【成功】資料處理完成。有效樣本總數：13657 筆</text:span></text:p>
      <text:p text:style-name="P2"><text:span text:style-name="T1"/></text:p>
      <text:p text:style-name="P2"><text:span text:style-name="T1">各運動組別樣本數分佈：</text:span></text:p>
      <text:p text:style-name="P2"><text:span text:style-name="T1">Activity_Group</text:span></text:p>
      <text:p text:style-name="P2"><text:span text:style-name="T1">4+ days <text:s text:c="4"/>5699</text:span></text:p>
      <text:p text:style-name="P2"><text:span text:style-name="T1">1-3 days <text:s text:c="3"/>4384</text:span></text:p>
      <text:p text:style-name="P2"><text:span text:style-name="T1">0 days <text:s text:c="5"/>3574</text:span></text:p>
      <text:p text:style-name="P2"><text:span text:style-name="T1">Name: count, dtype: int64</text:span></text:p>
      <text:p text:style-name="P2"><text:span text:style-name="T1"/></text:p>
      <text:p text:style-name="P3"><text:span text:style-name="T1"/></text:p>
      <text:p text:style-name="P1"><text:span text:style-name="T1">processing_summary</text:span></text:p>
      <text:p text:style-name="P3"><text:span text:style-name="T1"/></text:p>
      <text:p text:style-name="P3"><text:span text:style-name="T1">--- ANOVA 統計變異數分析表 ---</text:span></text:p>
      <text:p text:style-name="P3"><text:span text:style-name="T1"><text:s text:c="24"/>sum_sq <text:s text:c="6"/>df <text:s text:c="9"/>F <text:s text:c="7"/>PR(&gt;F)</text:span></text:p>
      <text:p text:style-name="P3"><text:span text:style-name="T1">C(Activity_Group) <text:s text:c="3"/>14.692520 <text:s text:c="5"/>2.0 <text:s/>35.184724 <text:s/>5.737332e-16</text:span></text:p>
      <text:p text:style-name="P3"><text:span text:style-name="T1">Residual <text:s text:c="10"/>2850.834756 <text:s/>13654.0 <text:s text:c="7"/>NaN <text:s text:c="10"/>NaN</text:span></text:p>
      <text:p text:style-name="P3"><text:span text:style-name="T1"/></text:p>
      <text:p text:style-name="P3"><text:span text:style-name="T1">------------------------------</text:span></text:p>
      <text:p text:style-name="P3"><text:span text:style-name="T1">【統計學判讀結論】</text:span></text:p>
      <text:p text:style-name="P3"><text:span text:style-name="T1">------------------------------</text:span></text:p>
      <text:p text:style-name="P3"><text:span text:style-name="T1">顯著性檢定 p-value = 5.7373e-16 &lt; 0.05。</text:span></text:p>
      <text:p text:style-name="P3"><text:span text:style-name="T1">【拒絕虛無假設 (H0)】：不同運動頻率的青少年在悲傷與絕望感上有顯著的統計差異！</text:span></text:p>
      <text:p text:style-name="P3"><text:span text:style-name="T1"/></text:p>
      <text:p text:style-name="P3"><text:span text:style-name="T1">--- 執行事後檢定 (Tukey HSD Post-hoc Test) ---</text:span></text:p>
      <text:p text:style-name="P3"><text:span text:style-name="T1"><text:s/>Multiple Comparison of Means - Tukey HSD, FWER=0.05 <text:s/></text:span></text:p>
      <text:p text:style-name="P3"><text:span text:style-name="T1">======================================================</text:span></text:p>
      <text:p text:style-name="P3"><text:span text:style-name="T1"><text:s/>group1 <text:s text:c="2"/>group2 <text:s/>meandiff p-adj <text:s/>lower <text:s/>upper <text:s/>reject</text:span></text:p>
      <text:p text:style-name="P3"><text:span text:style-name="T1">------------------------------------------------------</text:span></text:p>
      <text:p text:style-name="P3"><text:span text:style-name="T1"><text:s text:c="2"/>0 days 1-3 days <text:s text:c="2"/>0.0289 0.0139 0.0048 <text:s/>0.053 <text:s text:c="2"/>True</text:span></text:p>
      <text:p text:style-name="P3"><text:span text:style-name="T1"><text:s text:c="2"/>0 days <text:s/>4+ days <text:s text:c="2"/>0.0786 <text:s text:c="3"/>0.0 0.0558 0.1015 <text:s text:c="2"/>True</text:span></text:p>
      <text:p text:style-name="P3"><text:span text:style-name="T1">1-3 days <text:s/>4+ days <text:s text:c="2"/>0.0497 <text:s text:c="3"/>0.0 0.0282 0.0712 <text:s text:c="2"/>True</text:span></text:p>
      <text:p text:style-name="P3"><text:span text:style-name="T1">------------------------------------------------------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2</meta:generator>
  </office:meta>
</office:document-meta>
</file>